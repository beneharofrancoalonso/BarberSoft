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00000016A518DA91D8BA8F30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092cm" style:rel-column-width="16252*"/>
    </style:style>
    <style:style style:name="Tabla1.B" style:family="table-column">
      <style:table-column-properties style:column-width="12.409cm" style:rel-column-width="49283*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2.517cm" style:rel-column-width="9995*"/>
    </style:style>
    <style:style style:name="Tabla2.B" style:family="table-column">
      <style:table-column-properties style:column-width="8.483cm" style:rel-column-width="33692*"/>
    </style:style>
    <style:style style:name="Tabla2.C" style:family="table-column">
      <style:table-column-properties style:column-width="5.502cm" style:rel-column-width="21848*"/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  <style:text-properties fo:language="es" fo:country="ES"/>
    </style:style>
    <style:style style:name="P2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P3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Arial" fo:font-size="10pt" fo:language="es" fo:country="ES" officeooo:rsid="0001f8f3" officeooo:paragraph-rsid="011507eb" style:font-size-asian="10pt" style:font-size-complex="10pt"/>
    </style:style>
    <style:style style:name="P4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" fo:font-size="8pt" fo:language="es" fo:country="ES" officeooo:rsid="00063724" officeooo:paragraph-rsid="00063724" style:font-size-asian="8pt" style:font-size-complex="8pt"/>
    </style:style>
    <style:style style:name="P5" style:family="paragraph" style:parent-style-name="Foot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Arial" fo:font-size="10pt" fo:language="es" fo:country="ES" officeooo:paragraph-rsid="00063724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110e7e" officeooo:paragraph-rsid="00110e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0ffcb5" officeooo:paragraph-rsid="00070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0683c1" officeooo:paragraph-rsid="000683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0683c1" officeooo:paragraph-rsid="000708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0ffcb5" officeooo:paragraph-rsid="000708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11507eb" officeooo:paragraph-rsid="011507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11507eb" officeooo:paragraph-rsid="011507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11507eb" officeooo:paragraph-rsid="00c4fb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font-name="Arial" fo:font-size="10pt" fo:language="es" fo:country="ES" style:font-size-asian="10pt" style:font-size-complex="10pt"/>
    </style:style>
    <style:style style:name="P18" style:family="paragraph" style:parent-style-name="Standard">
      <style:text-properties style:font-name="Arial" fo:font-size="10pt" fo:language="es" fo:country="ES" officeooo:rsid="00006d46" officeooo:paragraph-rsid="00006d46" style:font-size-asian="10pt" style:font-size-complex="10pt"/>
    </style:style>
    <style:style style:name="P19" style:family="paragraph" style:parent-style-name="Standard">
      <style:text-properties style:font-name="Arial" fo:font-size="10pt" fo:language="es" fo:country="ES" officeooo:rsid="0000e2ca" officeooo:paragraph-rsid="0000e2ca" style:font-size-asian="10pt" style:font-size-complex="10pt"/>
    </style:style>
    <style:style style:name="P20" style:family="paragraph" style:parent-style-name="Standard">
      <style:paragraph-properties fo:break-before="page"/>
      <style:text-properties style:font-name="Arial" fo:font-size="10pt" fo:language="es" fo:country="ES" officeooo:rsid="0000e2ca" officeooo:paragraph-rsid="00006d46" style:font-size-asian="10pt" style:font-size-complex="10pt"/>
    </style:style>
    <style:style style:name="P21" style:family="paragraph" style:parent-style-name="Standard">
      <style:paragraph-properties fo:break-before="page"/>
      <style:text-properties style:font-name="Arial" fo:font-size="10pt" fo:language="es" fo:country="ES" officeooo:rsid="0000e2ca" officeooo:paragraph-rsid="00116e05" style:font-size-asian="10pt" style:font-size-complex="10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15pt" fo:language="es" fo:country="ES" fo:font-weight="bold" officeooo:rsid="00110e7e" officeooo:paragraph-rsid="0000e2c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16477b" officeooo:paragraph-rsid="00f657cd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16477b" officeooo:paragraph-rsid="01205ef1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f5a2a2" officeooo:paragraph-rsid="00f5a2a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f5a2a2" officeooo:paragraph-rsid="00f657cd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f5a2a2" officeooo:paragraph-rsid="011cfb0e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1245d88" officeooo:paragraph-rsid="01245d88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1245d88" officeooo:paragraph-rsid="012642e4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weight="normal" officeooo:rsid="002332a1" officeooo:paragraph-rsid="002e8d37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weight="normal" officeooo:rsid="00f657cd" officeooo:paragraph-rsid="00f657cd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style="italic" fo:font-weight="normal" officeooo:rsid="008c094d" officeooo:paragraph-rsid="008c094d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style="normal" style:text-underline-style="none" fo:font-weight="normal" officeooo:rsid="00f657cd" officeooo:paragraph-rsid="0133721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style="normal" style:text-underline-style="none" fo:font-weight="normal" officeooo:rsid="00fe236a" officeooo:paragraph-rsid="00f657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weight="bold" officeooo:rsid="01245d88" officeooo:paragraph-rsid="01245d88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fo:font-weight="bold" officeooo:rsid="01245d88" officeooo:paragraph-rsid="01267d8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00e2ca" officeooo:paragraph-rsid="012dacc3" style:font-name-asian="Microsoft YaHei" style:font-size-asian="10pt" style:font-name-complex="Mangal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es" fo:country="ES" fo:font-style="normal" fo:font-weight="bold" officeooo:rsid="011cfb0e" officeooo:paragraph-rsid="011cfb0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style:font-name="Arial" fo:font-size="10pt" fo:language="es" fo:country="ES" officeooo:rsid="0000e2ca" officeooo:paragraph-rsid="00f5a2a2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Arial" fo:font-size="10pt" fo:language="es" fo:country="ES" officeooo:rsid="0000e2ca" officeooo:paragraph-rsid="012c5e7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Arial" fo:font-size="10pt" fo:language="es" fo:country="ES" officeooo:rsid="0000e2ca" officeooo:paragraph-rsid="01337219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ES" officeooo:rsid="0016477b" officeooo:paragraph-rsid="00f5a2a2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es" fo:country="ES" fo:font-weight="bold" officeooo:rsid="011cfb0e" officeooo:paragraph-rsid="011cfb0e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ext_20_body" style:master-page-name="">
      <style:paragraph-properties fo:margin-top="0cm" fo:margin-bottom="0cm" style:contextual-spacing="false" fo:line-height="100%" fo:text-align="justify" style:justify-single-word="false" style:page-number="auto"/>
      <style:text-properties style:font-name="Arial" fo:font-size="12pt" fo:language="es" fo:country="ES" fo:font-weight="bold" officeooo:rsid="011cfb0e" officeooo:paragraph-rsid="011cfb0e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0f657cd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11cfb0e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11cfb0e" officeooo:paragraph-rsid="011cfb0e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11cfb0e" officeooo:paragraph-rsid="011d7cb1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11d7cb1" officeooo:paragraph-rsid="011d7cb1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280a56" officeooo:paragraph-rsid="01280a56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cfb0e" officeooo:paragraph-rsid="0120295f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cfb0e" officeooo:paragraph-rsid="011cfb0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cfb0e" officeooo:paragraph-rsid="0139acb1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cfb0e" officeooo:paragraph-rsid="0139acb1" style:font-name-asian="Microsoft YaHei" style:font-size-asian="10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weight="normal" officeooo:rsid="00f657cd" officeooo:paragraph-rsid="013aada9" style:font-size-asian="10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officeooo:rsid="011cfb0e" officeooo:paragraph-rsid="0120295f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officeooo:rsid="011cfb0e" officeooo:paragraph-rsid="013970f1" fo:hyphenate="true" fo:hyphenation-remain-char-count="2" fo:hyphenation-push-char-count="2" loext:hyphenation-no-caps="false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officeooo:rsid="011cfb0e" officeooo:paragraph-rsid="0120295f" fo:hyphenate="true" fo:hyphenation-remain-char-count="2" fo:hyphenation-push-char-count="2" loext:hyphenation-no-caps="false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fo:font-size="10pt" fo:font-weight="normal" officeooo:rsid="011d7cb1" officeooo:paragraph-rsid="011d7cb1" style:font-size-asian="8.75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fo:font-size="10pt" fo:font-weight="normal" officeooo:rsid="011e496a" officeooo:paragraph-rsid="011e496a" style:font-size-asian="8.75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fo:font-size="10pt" fo:font-weight="normal" officeooo:rsid="011e496a" officeooo:paragraph-rsid="0120295f" style:font-size-asian="8.75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fo:font-size="10pt" fo:font-weight="normal" officeooo:rsid="011cfb0e" officeooo:paragraph-rsid="012f06d7" style:font-size-asian="8.75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fo:font-size="10pt" fo:font-weight="normal" officeooo:rsid="013aada9" officeooo:paragraph-rsid="013aada9" style:font-size-asian="8.75pt" style:font-weight-asian="normal" style:font-size-complex="10pt" style:font-weight-complex="normal" fo:hyphenate="true" fo:hyphenation-remain-char-count="2" fo:hyphenation-push-char-count="2" loext:hyphenation-no-caps="false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2pt" fo:language="es" fo:country="ES" fo:font-style="normal" fo:font-weight="bold" officeooo:rsid="011cfb0e" officeooo:paragraph-rsid="012f06d7" style:font-name-asian="Microsoft YaHei" style:font-size-asian="12pt" style:font-style-asian="normal" style:font-weight-asian="bold" style:font-name-complex="Mangal" style:font-size-complex="12pt" style:font-style-complex="normal" style:font-weight-complex="bold" fo:hyphenate="true" fo:hyphenation-remain-char-count="2" fo:hyphenation-push-char-count="2" loext:hyphenation-no-caps="fals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2pt" fo:language="es" fo:country="ES" fo:font-style="normal" fo:font-weight="bold" officeooo:rsid="011cfb0e" officeooo:paragraph-rsid="0120295f" style:font-name-asian="Microsoft YaHei" style:font-size-asian="12pt" style:font-style-asian="normal" style:font-weight-asian="bold" style:font-name-complex="Mangal" style:font-size-complex="12pt" style:font-style-complex="normal" style:font-weight-complex="bold" fo:hyphenate="true" fo:hyphenation-remain-char-count="2" fo:hyphenation-push-char-count="2" loext:hyphenation-no-caps="false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2pt" fo:language="es" fo:country="ES" fo:font-style="normal" fo:font-weight="bold" officeooo:rsid="011cfb0e" officeooo:paragraph-rsid="01205ef1" style:font-name-asian="Microsoft YaHei" style:font-size-asian="12pt" style:font-style-asian="normal" style:font-weight-asian="bold" style:font-name-complex="Mangal" style:font-size-complex="12pt" style:font-style-complex="normal" style:font-weight-complex="bold" fo:hyphenate="true" fo:hyphenation-remain-char-count="2" fo:hyphenation-push-char-count="2" loext:hyphenation-no-caps="false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2pt" fo:language="es" fo:country="ES" fo:font-style="normal" fo:font-weight="normal" officeooo:rsid="011cfb0e" officeooo:paragraph-rsid="011d7cb1" style:font-name-asian="Microsoft YaHei" style:font-size-asian="12pt" style:font-style-asian="normal" style:font-weight-asian="normal" style:font-name-complex="Mangal" style:font-size-complex="12pt" style:font-style-complex="normal" style:font-weight-complex="normal" fo:hyphenate="true" fo:hyphenation-remain-char-count="2" fo:hyphenation-push-char-count="2" loext:hyphenation-no-caps="false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d7cb1" officeooo:paragraph-rsid="011d7cb1" style:font-name-asian="Microsoft YaHei" style:font-size-asian="8.75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e496a" officeooo:paragraph-rsid="0120295f" style:font-name-asian="Microsoft YaHei" style:font-size-asian="8.75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1e496a" officeooo:paragraph-rsid="011e496a" style:font-name-asian="Microsoft YaHei" style:font-size-asian="8.75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3f0f56" officeooo:paragraph-rsid="013aada9" style:font-name-asian="Microsoft YaHei" style:font-size-asian="8.75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3aada9" officeooo:paragraph-rsid="013aada9" style:font-name-asian="Microsoft YaHei" style:font-size-asian="8.75pt" style:font-style-asian="normal" style:font-weight-asian="normal" style:font-name-complex="Mang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4pt" fo:language="es" fo:country="ES" fo:font-style="normal" fo:font-weight="bold" officeooo:rsid="012c5e78" officeooo:paragraph-rsid="01337219" style:font-name-asian="Microsoft YaHei" style:font-size-asian="14pt" style:font-style-asian="normal" style:font-weight-asian="bold" style:font-name-complex="Mangal" style:font-size-complex="14pt" style:font-style-complex="normal" style:font-weight-complex="bold" fo:hyphenate="true" fo:hyphenation-remain-char-count="2" fo:hyphenation-push-char-count="2" loext:hyphenation-no-caps="false"/>
    </style:style>
    <style:style style:name="P76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style:text-underline-style="solid" style:text-underline-width="auto" style:text-underline-color="font-color" fo:font-weight="normal" officeooo:rsid="01280a56" officeooo:paragraph-rsid="01280a56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1280a56" officeooo:paragraph-rsid="01280a56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11cfb0e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style:text-underline-style="solid" style:text-underline-width="auto" style:text-underline-color="font-color" fo:font-weight="normal" officeooo:rsid="01280a56" officeooo:paragraph-rsid="01280a56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style:text-underline-style="solid" style:text-underline-width="auto" style:text-underline-color="font-color" fo:font-weight="normal" officeooo:rsid="01280a56" officeooo:paragraph-rsid="0129e140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280a56" officeooo:paragraph-rsid="01280a56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280a56" officeooo:paragraph-rsid="0128f341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28f341" officeooo:paragraph-rsid="0128f341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normal" fo:font-weight="normal" officeooo:rsid="0129e140" officeooo:paragraph-rsid="0129e140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officeooo:paragraph-rsid="0128f341" fo:hyphenate="true" fo:hyphenation-remain-char-count="2" fo:hyphenation-push-char-count="2" loext:hyphenation-no-caps="false"/>
    </style:style>
    <style:style style:name="P86" style:family="paragraph" style:parent-style-name="Text_20_body" style:master-page-name="">
      <loext:graphic-properties draw:fill="none"/>
      <style:paragraph-properties fo:margin-left="1.401cm" fo:margin-right="0cm" fo:margin-top="0cm" fo:margin-bottom="0cm" style:contextual-spacing="false" fo:line-height="100%" fo:text-align="justify" style:justify-single-word="false" fo:hyphenation-ladder-count="no-limit" fo:text-indent="-1.401cm" style:auto-text-indent="false" style:page-number="auto" fo:background-color="transparent"/>
      <style:text-properties style:font-name="Arial" fo:font-size="12pt" fo:language="es" fo:country="ES" fo:font-weight="bold" officeooo:rsid="011cfb0e" officeooo:paragraph-rsid="011cfb0e" style:font-name-asian="Microsoft YaHei" style:font-size-asian="12pt" style:font-weight-asian="bold" style:font-name-complex="Mangal" style:font-size-complex="12pt" style:font-weight-complex="bold" fo:hyphenate="true" fo:hyphenation-remain-char-count="2" fo:hyphenation-push-char-count="2" loext:hyphenation-no-caps="false"/>
    </style:style>
    <style:style style:name="P87" style:family="paragraph" style:parent-style-name="Heading_20_1" style:master-page-name="">
      <loext:graphic-properties draw:fill="none" draw:fill-color="#729fcf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-0.499cm" style:auto-text-indent="false" style:page-number="auto" fo:background-color="transparent" fo:keep-with-next="always">
        <style:tab-stops/>
      </style:paragraph-properties>
      <style:text-properties style:font-name="Arial" fo:font-size="14pt" fo:language="es" fo:country="ES" fo:font-weight="bold" officeooo:rsid="00f4a941" officeooo:paragraph-rsid="00f4a941" style:font-name-asian="Microsoft YaHei" style:font-size-asian="14pt" style:font-weight-asian="bold" style:font-name-complex="Mangal" style:font-size-complex="14pt" style:font-weight-complex="bold" fo:hyphenate="true" fo:hyphenation-remain-char-count="2" fo:hyphenation-push-char-count="2" loext:hyphenation-no-caps="false"/>
    </style:style>
    <style:style style:name="P88" style:family="paragraph" style:parent-style-name="Heading_20_1" style:master-page-name="">
      <loext:graphic-properties draw:fill="none" draw:fill-color="#729fcf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-0.499cm" style:auto-text-indent="false" style:page-number="auto" fo:background-color="transparent" fo:keep-with-next="always">
        <style:tab-stops/>
      </style:paragraph-properties>
      <style:text-properties style:font-name="Arial" fo:font-size="14pt" fo:language="es" fo:country="ES" fo:font-weight="bold" officeooo:rsid="01245d88" officeooo:paragraph-rsid="01245d88" style:font-name-asian="Microsoft YaHei" style:font-size-asian="14pt" style:font-weight-asian="bold" style:font-name-complex="Mangal" style:font-size-complex="14pt" style:font-weight-complex="bold" fo:hyphenate="true" fo:hyphenation-remain-char-count="2" fo:hyphenation-push-char-count="2" loext:hyphenation-no-caps="false"/>
    </style:style>
    <style:style style:name="P89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4pt" fo:language="es" fo:country="ES" fo:font-style="normal" fo:font-weight="bold" officeooo:rsid="012c5e78" officeooo:paragraph-rsid="012c5e78" style:font-name-asian="Microsoft YaHei" style:font-size-asian="14pt" style:font-style-asian="normal" style:font-weight-asian="bold" style:font-name-complex="Mangal" style:font-size-complex="14pt" style:font-style-complex="normal" style:font-weight-complex="bold" fo:hyphenate="true" fo:hyphenation-remain-char-count="2" fo:hyphenation-push-char-count="2" loext:hyphenation-no-caps="false"/>
    </style:style>
    <style:style style:name="P90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4pt" fo:language="es" fo:country="ES" fo:font-style="normal" fo:font-weight="bold" officeooo:rsid="01337219" officeooo:paragraph-rsid="01337219" style:font-name-asian="Microsoft YaHei" style:font-size-asian="14pt" style:font-style-asian="normal" style:font-weight-asian="bold" style:font-name-complex="Mangal" style:font-size-complex="14pt" style:font-style-complex="normal" style:font-weight-complex="bold" fo:hyphenate="true" fo:hyphenation-remain-char-count="2" fo:hyphenation-push-char-count="2" loext:hyphenation-no-caps="false"/>
    </style:style>
    <style:style style:name="P91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4pt" fo:language="es" fo:country="ES" fo:font-style="normal" fo:font-weight="bold" officeooo:rsid="013aada9" officeooo:paragraph-rsid="013aada9" style:font-name-asian="Microsoft YaHei" style:font-size-asian="14pt" style:font-style-asian="normal" style:font-weight-asian="bold" style:font-name-complex="Mangal" style:font-size-complex="14pt" style:font-style-complex="normal" style:font-weight-complex="bold" fo:hyphenate="true" fo:hyphenation-remain-char-count="2" fo:hyphenation-push-char-count="2" loext:hyphenation-no-caps="false"/>
    </style:style>
    <style:style style:name="P92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4pt" fo:language="es" fo:country="ES" fo:font-style="normal" fo:font-weight="bold" officeooo:rsid="01205ef1" officeooo:paragraph-rsid="013aada9" style:font-name-asian="Microsoft YaHei" style:font-size-asian="14pt" style:font-style-asian="normal" style:font-weight-asian="bold" style:font-name-complex="Mangal" style:font-size-complex="14pt" style:font-style-complex="normal" style:font-weight-complex="bold" fo:hyphenate="true" fo:hyphenation-remain-char-count="2" fo:hyphenation-push-char-count="2" loext:hyphenation-no-caps="false"/>
    </style:style>
    <style:style style:name="P93" style:family="paragraph" style:parent-style-name="Heading_20_2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hyphenation-ladder-count="no-limit" fo:text-indent="-0.499cm" style:auto-text-indent="false" style:page-number="auto" fo:background-color="transparent" fo:keep-with-next="always"/>
      <style:text-properties style:font-name="Arial" fo:font-size="13pt" fo:language="es" fo:country="ES" fo:font-weight="bold" officeooo:rsid="011cfb0e" officeooo:paragraph-rsid="011cfb0e" style:font-name-asian="Microsoft YaHei" style:font-size-asian="13pt" style:font-weight-asian="bold" style:font-name-complex="Mangal" style:font-size-complex="13pt" style:font-weight-complex="bold" fo:hyphenate="true" fo:hyphenation-remain-char-count="2" fo:hyphenation-push-char-count="2" loext:hyphenation-no-caps="false"/>
    </style:style>
    <style:style style:name="P94" style:family="paragraph" style:parent-style-name="Heading_20_2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es" fo:country="ES" fo:font-weight="bold" officeooo:rsid="011cfb0e" officeooo:paragraph-rsid="011cfb0e" style:font-name-asian="Microsoft YaHei" style:font-size-asian="12pt" style:font-weight-asian="bold" style:font-name-complex="Mangal" style:font-size-complex="12pt" style:font-weight-complex="bold"/>
    </style:style>
    <style:style style:name="P95" style:family="paragraph" style:parent-style-name="Heading_20_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2pt" fo:language="es" fo:country="ES" fo:font-style="normal" fo:font-weight="bold" officeooo:rsid="01218f95" officeooo:paragraph-rsid="01218f95" style:font-name-asian="Microsoft YaHei" style:font-size-asian="12pt" style:font-style-asian="normal" style:font-weight-asian="bold" style:font-name-complex="Mangal" style:font-size-complex="12pt" style:font-style-complex="normal" style:font-weight-complex="bold" fo:hyphenate="true" fo:hyphenation-remain-char-count="2" fo:hyphenation-push-char-count="2" loext:hyphenation-no-caps="false"/>
    </style:style>
    <style:style style:name="P96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Arial" fo:font-size="10pt" fo:language="es" fo:country="ES" fo:font-style="italic" fo:font-weight="normal" officeooo:rsid="00f657cd" officeooo:paragraph-rsid="00f657cd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97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Arial" fo:font-size="10pt" fo:language="es" fo:country="ES" fo:font-style="italic" fo:font-weight="normal" officeooo:rsid="00f657cd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98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99" style:family="paragraph" style:parent-style-name="Standard" style:list-style-name="L1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/>
      <style:text-properties style:font-name="Arial" fo:font-size="10pt" fo:language="es" fo:country="ES" fo:font-style="italic" fo:font-weight="normal" officeooo:rsid="00f657cd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0" style:family="paragraph" style:parent-style-name="Standard" style:list-style-name="L1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/>
      <style:text-properties style:font-name="Arial" fo:font-size="10pt" fo:language="es" fo:country="ES" fo:font-style="italic" fo:font-weight="normal" officeooo:rsid="01245d88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1" style:family="paragraph" style:parent-style-name="Standard" style:list-style-name="L1">
      <loext:graphic-properties draw:fill="none"/>
      <style:paragraph-properties fo:margin-left="0.4cm" fo:margin-right="0cm" fo:margin-top="0cm" fo:margin-bottom="0cm" style:contextual-spacing="false" fo:line-height="100%" fo:text-align="justify" style:justify-single-word="false" fo:hyphenation-ladder-count="no-limit" fo:text-indent="-0.4cm" style:auto-text-indent="false" fo:background-color="transparent"/>
      <style:text-properties style:font-name="Arial" fo:font-size="10pt" fo:language="es" fo:country="ES" fo:font-style="italic" fo:font-weight="normal" officeooo:rsid="008c094d" officeooo:paragraph-rsid="008c094d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2" style:family="paragraph" style:parent-style-name="Standard" style:list-style-name="L1">
      <loext:graphic-properties draw:fill="none"/>
      <style:paragraph-properties fo:margin-left="0.4cm" fo:margin-right="0cm" fo:margin-top="0cm" fo:margin-bottom="0cm" style:contextual-spacing="false" fo:line-height="100%" fo:text-align="justify" style:justify-single-word="false" fo:hyphenation-ladder-count="no-limit" fo:text-indent="-0.4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0f657cd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3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bold" officeooo:rsid="01245d88" officeooo:paragraph-rsid="01245d88" style:font-size-asian="10pt" style:font-style-asian="italic" style:font-weight-asian="bold" style:font-size-complex="10pt" style:font-style-complex="italic" style:font-weight-complex="bold" fo:hyphenate="true" fo:hyphenation-remain-char-count="2" fo:hyphenation-push-char-count="2" loext:hyphenation-no-caps="false"/>
    </style:style>
    <style:style style:name="P104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1245d88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5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0.409cm"/>
        </style:tab-stops>
      </style:paragraph-properties>
      <style:text-properties style:font-name="Arial" fo:font-size="10pt" fo:language="es" fo:country="ES" fo:font-style="italic" fo:font-weight="normal" officeooo:rsid="00f657cd" officeooo:paragraph-rsid="01245d88" style:font-size-asian="10pt" style:font-style-asian="italic" style:font-weight-asian="normal" style:font-size-complex="10pt" style:font-style-complex="italic" style:font-weight-complex="normal" fo:hyphenate="true" fo:hyphenation-remain-char-count="2" fo:hyphenation-push-char-count="2" loext:hyphenation-no-caps="false"/>
    </style:style>
    <style:style style:name="P106" style:family="paragraph" style:parent-style-name="Standard" style:list-style-name="L2">
      <loext:graphic-properties draw:fill="none"/>
      <style:paragraph-properties fo:margin-left="1.79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language="es" fo:country="ES" officeooo:paragraph-rsid="001e78b9"/>
    </style:style>
    <style:style style:name="P107" style:family="paragraph" style:parent-style-name="Standard" style:list-style-name="L2">
      <loext:graphic-properties draw:fill="none"/>
      <style:paragraph-properties fo:margin-left="1.79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language="es" fo:country="ES" officeooo:paragraph-rsid="013aada9"/>
    </style:style>
    <style:style style:name="P108" style:family="paragraph" style:parent-style-name="Standard" style:list-style-name="L2">
      <loext:graphic-properties draw:fill="none"/>
      <style:paragraph-properties fo:margin-left="1.79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language="es" fo:country="ES" officeooo:paragraph-rsid="01337219"/>
    </style:style>
    <style:style style:name="P109" style:family="paragraph">
      <style:paragraph-properties fo:text-align="center"/>
    </style:style>
    <style:style style:name="P110" style:family="paragraph">
      <loext:graphic-properties draw:fill="none" draw:fill-color="#ffffff"/>
      <style:paragraph-properties style:writing-mode="lr-tb"/>
      <style:text-properties style:font-name="Arial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8pt" officeooo:rsid="011507eb" style:font-size-asian="8pt" style:font-size-complex="8pt"/>
    </style:style>
    <style:style style:name="T3" style:family="text">
      <style:text-properties style:font-name="Times New Roman" fo:font-size="8pt" officeooo:rsid="0143c4a4" style:font-size-asian="8pt" style:font-size-complex="8pt"/>
    </style:style>
    <style:style style:name="T4" style:family="text">
      <style:text-properties officeooo:rsid="000c7053"/>
    </style:style>
    <style:style style:name="T5" style:family="text">
      <style:text-properties officeooo:rsid="00c6f480"/>
    </style:style>
    <style:style style:name="T6" style:family="text">
      <style:text-properties officeooo:rsid="00f657cd"/>
    </style:style>
    <style:style style:name="T7" style:family="text">
      <style:text-properties style:font-name="Arial" fo:font-size="12pt" fo:language="es" fo:country="E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8" style:family="text">
      <style:text-properties style:font-name="Arial" fo:font-size="12pt" fo:language="es" fo:country="ES" fo:font-style="normal" fo:font-weight="bold" officeooo:rsid="011d7cb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9" style:family="text">
      <style:text-properties style:font-name="Arial" fo:font-size="12pt" fo:language="es" fo:country="ES" fo:font-style="normal" fo:font-weight="bold" officeooo:rsid="01229ab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10" style:family="text">
      <style:text-properties style:font-name="Arial" fo:font-size="12pt" fo:language="es" fo:country="ES" fo:font-style="normal" fo:font-weight="bold" officeooo:rsid="012e10c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11" style:family="text">
      <style:text-properties style:font-name="Arial" fo:font-size="12pt" fo:language="es" fo:country="ES" fo:font-style="normal" fo:font-weight="bold" officeooo:rsid="012f06d7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12" style:family="text">
      <style:text-properties style:font-name="Arial" fo:language="es" fo:country="ES" fo:font-style="normal" style:font-name-asian="Microsoft YaHei" style:font-style-asian="normal" style:font-name-complex="Mangal" style:font-style-complex="normal"/>
    </style:style>
    <style:style style:name="T13" style:family="text">
      <style:text-properties style:font-name="Arial" fo:language="es" fo:country="ES" fo:font-style="normal" officeooo:rsid="011cfb0e" style:font-name-asian="Microsoft YaHei" style:font-style-asian="normal" style:font-name-complex="Mangal" style:font-style-complex="normal"/>
    </style:style>
    <style:style style:name="T14" style:family="text">
      <style:text-properties style:font-name="Arial" fo:language="es" fo:country="ES" fo:font-style="normal" officeooo:rsid="0120295f" style:font-name-asian="Microsoft YaHei" style:font-style-asian="normal" style:font-name-complex="Mangal" style:font-style-complex="normal"/>
    </style:style>
    <style:style style:name="T15" style:family="text">
      <style:text-properties style:font-name="Arial" fo:language="es" fo:country="ES" fo:font-style="normal" officeooo:rsid="012c5e78" style:font-name-asian="Microsoft YaHei" style:font-style-asian="normal" style:font-name-complex="Mangal" style:font-style-complex="normal"/>
    </style:style>
    <style:style style:name="T16" style:family="text">
      <style:text-properties style:font-name="Arial" fo:language="es" fo:country="ES" fo:font-style="normal" officeooo:rsid="013df833" style:font-name-asian="Microsoft YaHei" style:font-style-asian="normal" style:font-name-complex="Mangal" style:font-style-complex="normal"/>
    </style:style>
    <style:style style:name="T17" style:family="text">
      <style:text-properties style:font-name="Arial" fo:language="es" fo:country="ES" fo:font-style="normal" officeooo:rsid="013f0f56" style:font-name-asian="Microsoft YaHei" style:font-style-asian="normal" style:font-name-complex="Mangal" style:font-style-complex="normal"/>
    </style:style>
    <style:style style:name="T18" style:family="text">
      <style:text-properties style:font-name="Arial" fo:font-size="10pt" fo:language="es" fo:country="ES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9" style:family="text">
      <style:text-properties style:font-name="Arial" fo:font-size="10pt" fo:language="es" fo:country="ES" fo:font-style="normal" fo:font-weight="normal" officeooo:rsid="0128f34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" fo:font-size="10pt" fo:language="es" fo:country="ES" fo:font-style="normal" style:text-underline-style="solid" style:text-underline-width="auto" style:text-underline-color="font-color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style:font-name="Arial" fo:font-size="10pt" officeooo:rsid="0129e140" style:font-size-asian="10pt" style:font-size-complex="10pt"/>
    </style:style>
    <style:style style:name="T23" style:family="text">
      <style:text-properties fo:font-style="normal" style:font-name-asian="Microsoft YaHei" style:font-style-asian="normal" style:font-name-complex="Mang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name-asian="Microsoft YaHei" style:font-style-asian="normal" style:font-name-complex="Mang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11d7cb1" style:font-name-asian="Microsoft YaHei" style:font-style-asian="normal" style:font-name-complex="Mang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137eb33" style:font-name-asian="Microsoft YaHei" style:font-style-asian="normal" style:font-name-complex="Mangal" style:font-style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1395ccc"/>
    </style:style>
    <style:style style:name="T29" style:family="text">
      <style:text-properties style:text-underline-style="solid" style:text-underline-width="auto" style:text-underline-color="font-color" officeooo:rsid="0139acb1"/>
    </style:style>
    <style:style style:name="T30" style:family="text">
      <style:text-properties officeooo:rsid="01218f95"/>
    </style:style>
    <style:style style:name="T31" style:family="text">
      <style:text-properties officeooo:rsid="01245d88"/>
    </style:style>
    <style:style style:name="T32" style:family="text">
      <style:text-properties officeooo:rsid="012642e4"/>
    </style:style>
    <style:style style:name="T33" style:family="text">
      <style:text-properties officeooo:rsid="01267d81"/>
    </style:style>
    <style:style style:name="T34" style:family="text">
      <style:text-properties officeooo:rsid="01280a56"/>
    </style:style>
    <style:style style:name="T35" style:family="text">
      <style:text-properties officeooo:rsid="0128f341"/>
    </style:style>
    <style:style style:name="T36" style:family="text">
      <style:text-properties officeooo:rsid="0129e140"/>
    </style:style>
    <style:style style:name="T37" style:family="text">
      <style:text-properties officeooo:rsid="01328fd2"/>
    </style:style>
    <style:style style:name="T38" style:family="text">
      <style:text-properties officeooo:rsid="01372db5"/>
    </style:style>
    <style:style style:name="T39" style:family="text">
      <style:text-properties officeooo:rsid="0139acb1"/>
    </style:style>
    <style:style style:name="T40" style:family="text">
      <style:text-properties officeooo:rsid="013aada9"/>
    </style:style>
    <style:style style:name="T41" style:family="text">
      <style:text-properties officeooo:rsid="01403c56"/>
    </style:style>
    <style:style style:name="T42" style:family="text">
      <style:text-properties style:font-name="Arial"/>
    </style:style>
    <style:style style:name="T43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44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><draw:frame text:anchor-type="paragraph" draw:z-index="1" draw:name="Forma1" draw:style-name="gr1" draw:text-style-name="P110" svg:width="16.505cm" svg:height="20.453cm" svg:x="0.012cm" svg:y="0.115cm"><draw:text-box><text:p><text:span text:style-name="T42"/></text:p><text:p><text:span text:style-name="T42"/></text:p><text:p><text:span text:style-name="T42"/></text:p><text:p><text:span text:style-name="T42"/></text:p><text:p><text:span text:style-name="T42"/></text:p><text:p><text:span text:style-name="T42"/></text:p><text:p><text:span text:style-name="T42"/></text:p><text:p text:style-name="P109"><text:span text:style-name="T43">Ficha Técnica</text:span></text:p><text:p text:style-name="P109"><text:span text:style-name="T43"/></text:p><text:p text:style-name="P109"><text:span text:style-name="T44">[Nombre de la Aplicación]</text:span></text:p><text:p text:style-name="P109"><text:span text:style-name="T44"/></text:p><text:p text:style-name="P109"><text:span text:style-name="T45">[Cod. Nombre del Sistema]</text:span></text:p><text:p text:style-name="P109"><text:span text:style-name="T45">[Cod. Nombre del Subsistema ]</text:span></text:p><text:p><text:span text:style-name="T44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/>
        <table:table-row table:style-name="TableLine1780294710560">
          <table:table-cell table:style-name="Tabla1.A1" office:value-type="string">
            <text:p text:style-name="P10">Nombre del fichero:</text:p>
          </table:table-cell>
          <table:table-cell table:style-name="Tabla1.B1" office:value-type="string">
            <text:p text:style-name="P13"><text:file-name text:display="name-and-extension">DAW_PRW_[APCODE]_4. Ficha técnica.odt</text:file-name></text:p>
          </table:table-cell>
        </table:table-row>
        <table:table-row table:style-name="TableLine1780294696416">
          <table:table-cell table:style-name="Tabla1.A2" office:value-type="string">
            <text:p text:style-name="P11">Fecha de esta versión:</text:p>
          </table:table-cell>
          <table:table-cell table:style-name="Tabla1.B2" office:value-type="string">
            <text:p text:style-name="P12"><text:modification-date style:data-style-name="N36">11/01/2024</text:modification-date></text:p>
          </table:table-cell>
        </table:table-row>
      </table:table>
      <text:p text:style-name="P17"/>
      <text:p text:style-name="P22">Historial de revisiones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780294702400">
          <table:table-cell table:style-name="Tabla2.A1" office:value-type="string">
            <text:p text:style-name="P9">Fecha</text:p>
          </table:table-cell>
          <table:table-cell table:style-name="Tabla2.A1" office:value-type="string">
            <text:p text:style-name="P9">Descripción</text:p>
          </table:table-cell>
          <table:table-cell table:style-name="Tabla2.C1" office:value-type="string">
            <text:p text:style-name="P9">Autor</text:p>
          </table:table-cell>
        </table:table-row>
        <table:table-row table:style-name="TableLine1780294703488">
          <table:table-cell table:style-name="Tabla2.A2" office:value-type="string">
            <text:p text:style-name="P14">[Fecha]</text:p>
          </table:table-cell>
          <table:table-cell table:style-name="Tabla2.A2" office:value-type="string">
            <text:p text:style-name="P15">[Descripción de la modificación]</text:p>
          </table:table-cell>
          <table:table-cell table:style-name="Tabla2.C2" office:value-type="string">
            <text:p text:style-name="P16">[Autor]</text:p>
          </table:table-cell>
        </table:table-row>
        <table:table-row table:style-name="TableLine1780294726608">
          <table:table-cell table:style-name="Tabla2.A2" office:value-type="string">
            <text:p text:style-name="P14">[Fecha]</text:p>
          </table:table-cell>
          <table:table-cell table:style-name="Tabla2.A2" office:value-type="string">
            <text:p text:style-name="P15">[Descripción de la modificación]</text:p>
          </table:table-cell>
          <table:table-cell table:style-name="Tabla2.C2" office:value-type="string">
            <text:p text:style-name="P15">[Autor]</text:p>
          </table:table-cell>
        </table:table-row>
      </table:table>
      <text:p text:style-name="P18"/>
      <text:p text:style-name="P18"/>
      <text:p text:style-name="P20"/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5"><text:a xlink:type="simple" xlink:href="#__RefHeading___Toc652_27234699271" text:style-name="Index_20_Link" text:visited-style-name="Index_20_Link">1 INTRODUCCIÓN<text:tab/>4</text:a></text:p>
          <text:p text:style-name="P45"><text:a xlink:type="simple" xlink:href="#__RefHeading___Toc652_272346992711" text:style-name="Index_20_Link" text:visited-style-name="Index_20_Link">2 REQUISITOS TÉCNICOS<text:tab/>4</text:a></text:p>
          <text:p text:style-name="P46"><text:a xlink:type="simple" xlink:href="#__RefHeading___Toc3229_2822432669" text:style-name="Index_20_Link" text:visited-style-name="Index_20_Link">2.1 Plataforma y herramientas de desarrollo software<text:tab/>4</text:a></text:p>
          <text:p text:style-name="P46"><text:a xlink:type="simple" xlink:href="#__RefHeading___Toc3229_28224326691" text:style-name="Index_20_Link" text:visited-style-name="Index_20_Link">2.2 Plataforma de Ejecución<text:tab/>5</text:a></text:p>
          <text:p text:style-name="P46"><text:a xlink:type="simple" xlink:href="#__RefHeading___Toc3229_282243266912" text:style-name="Index_20_Link" text:visited-style-name="Index_20_Link">2.3 Puntos de acceso a la aplicación<text:tab/>5</text:a></text:p>
          <text:p text:style-name="P45"><text:a xlink:type="simple" xlink:href="#__RefHeading___Toc652_27234699271111" text:style-name="Index_20_Link" text:visited-style-name="Index_20_Link">3 Bases de Datos<text:tab/>5</text:a></text:p>
          <text:p text:style-name="P45"><text:a xlink:type="simple" xlink:href="#__RefHeading___Toc652_272346992711111" text:style-name="Index_20_Link" text:visited-style-name="Index_20_Link">4 Interfaces externas<text:tab/>6</text:a></text:p>
          <text:p text:style-name="P45"><text:a xlink:type="simple" xlink:href="#__RefHeading___Toc652_2723469927111" text:style-name="Index_20_Link" text:visited-style-name="Index_20_Link">5 Seguridad<text:tab/>6</text:a></text:p>
          <text:p text:style-name="P45"><text:a xlink:type="simple" xlink:href="#__RefHeading___Toc652_27234699271114" text:style-name="Index_20_Link" text:visited-style-name="Index_20_Link">6 Control de versiones<text:tab/>6</text:a></text:p>
          <text:p text:style-name="P45"><text:a xlink:type="simple" xlink:href="#__RefHeading___Toc652_27234699271112" text:style-name="Index_20_Link" text:visited-style-name="Index_20_Link">7 Observaciones<text:tab/>6</text:a></text:p>
        </text:index-body>
      </text:table-of-content>
      <text:p text:style-name="P19"/>
      <text:p text:style-name="P19"/>
      <text:p text:style-name="P21"/>
      <text:h text:style-name="P87" text:outline-level="1"><text:bookmark-start text:name="__RefHeading___Toc652_27234699271"/>INTRODUCCIÓN<text:bookmark-end text:name="__RefHeading___Toc652_27234699271"/></text:h>
      <text:p text:style-name="P26"/>
      <text:p text:style-name="P26">[Describir <text:span text:style-name="T6">el objetivo de este documento y el contexto]</text:span></text:p>
      <text:p text:style-name="P26"/>
      <text:p text:style-name="P39"/>
      <text:h text:style-name="P88" text:outline-level="1"><text:bookmark-start text:name="__RefHeading___Toc652_272346992711"/>REQUISITOS TÉCNICOS<text:bookmark-end text:name="__RefHeading___Toc652_272346992711"/></text:h>
      <text:p text:style-name="P42"/>
      <text:h text:style-name="P93" text:outline-level="2"><text:bookmark-start text:name="__RefHeading___Toc3229_2822432669"/>Plataforma <text:span text:style-name="T31">y herramientas de desarrollo s</text:span>oftware<text:bookmark-end text:name="__RefHeading___Toc3229_2822432669"/></text:h>
      <text:p text:style-name="P43"/>
      <text:p text:style-name="P86">2.<text:span text:style-name="T41">1</text:span>.1. <text:s/>Requisitos front-end</text:p>
      <text:p text:style-name="P25"/>
      <text:p text:style-name="P28">A continuación se enumeran las diferentes tecnologías de desarrollo front-end, versiones <text:span text:style-name="T32">y herramientas de apoyo al desarrollo</text:span>:</text:p>
      <text:p text:style-name="P28"/>
      <text:p text:style-name="P35">I) Tecnologías / framework</text:p>
      <text:p text:style-name="P30"/>
      <text:list xml:id="list1181102663" text:style-name="L1">
        <text:list-item>
          <text:p text:style-name="P96">[<text:span text:style-name="T31">Tecnología 1 | Versión X</text:span>]</text:p>
          <text:p text:style-name="P101"/>
        </text:list-item>
        <text:list-item>
          <text:p text:style-name="P97">[<text:span text:style-name="T31">Tecnología 2 | Versión X</text:span>]</text:p>
        </text:list-item>
      </text:list>
      <text:p text:style-name="P32"/>
      <text:list xml:id="list4105889576738" text:continue-numbering="true" text:style-name="L1">
        <text:list-item>
          <text:p text:style-name="P98">[<text:span text:style-name="T31">Tecnología n | Versión X</text:span>]</text:p>
          <text:p text:style-name="P102"/>
          <text:p text:style-name="P103">II) Otras Herramientas de desarrollo, depuración, etc</text:p>
          <text:p text:style-name="P104"/>
        </text:list-item>
        <text:list-item>
          <text:p text:style-name="P97">[<text:span text:style-name="T31">Herramienta 1 | Versión X</text:span>]</text:p>
          <text:p text:style-name="P99"/>
        </text:list-item>
        <text:list-item>
          <text:p text:style-name="P97">[<text:span text:style-name="T31">Herramienta 2 | Versión X</text:span>]</text:p>
          <text:p text:style-name="P99"/>
        </text:list-item>
        <text:list-item>
          <text:p text:style-name="P100">[Herramienta n | Versión X]</text:p>
          <text:p text:style-name="P105"/>
        </text:list-item>
      </text:list>
      <text:p text:style-name="P47"/>
      <text:p text:style-name="P44">2.<text:span text:style-name="T41">1</text:span>.2. Requisitos back-end</text:p>
      <text:p text:style-name="P27"/>
      <text:p text:style-name="P29">A continuación se enumeran las diferentes tecnologías de desarrollo <text:span text:style-name="T32">back</text:span>-end, versiones <text:span text:style-name="T32">y herramientas de apoyo al desarrollo</text:span>: <text:span text:style-name="T34">[Sustituya lo indicado entre corchetes por la información adecuada]</text:span></text:p>
      <text:p text:style-name="P29"/>
      <text:p text:style-name="P36">I) <text:span text:style-name="T33">Plataforma </text:span><text:span text:style-name="T38">de desarrollo</text:span><text:span text:style-name="T33"> [.</text:span><text:span text:style-name="T34">NET </text:span><text:span text:style-name="T38">| </text:span><text:span text:style-name="T34">JAVA </text:span><text:span text:style-name="T38">|</text:span><text:span text:style-name="T34"> PHP </text:span><text:span text:style-name="T38">| </text:span><text:span text:style-name="T34">PYTHON </text:span><text:span text:style-name="T38">|</text:span><text:span text:style-name="T34"> etc</text:span><text:span text:style-name="T33">]</text:span></text:p>
      <text:p text:style-name="P52"/>
      <text:p text:style-name="P76">a) Framework, <text:span text:style-name="T35">runtime</text:span> y versiones</text:p>
      <text:p text:style-name="P77"/>
      <text:p text:style-name="P81">[Indicar framework (si se hace uso de alguno), versión del fram<text:span text:style-name="T35">e</text:span>work o dependencias <text:span text:style-name="T35">esenciales </text:span>y sus versiones.]</text:p>
      <text:p text:style-name="P81"/>
      <text:p text:style-name="P82">[<text:span text:style-name="T35">Ejemplos: </text:span>Java EE <text:span text:style-name="T35">JDK11 con javax.servlet 4.0</text:span>, Java Spring <text:span text:style-name="T35">JDK11</text:span>, Microsoft .NET Core X, PHP<text:span text:style-name="T35">8</text:span> Laravel <text:span text:style-name="T35">X</text:span>, PHP<text:span text:style-name="T35">8</text:span> Symfony <text:span text:style-name="T35">X</text:span>, <text:span text:style-name="T35">PHP8 (sin framework), etc</text:span>]</text:p>
      <text:p text:style-name="P77"/>
      <text:p text:style-name="P79">b) Esquema de desarrollo</text:p>
      <text:p text:style-name="P77"/>
      <text:p text:style-name="P83">[Indicar datos de la plantilla que se ha elegido (si se hace uso de alguna), versión o modelo de desarrollo como por ejemplo MVC puro.]</text:p>
      <text:p text:style-name="P83"/>
      <text:p text:style-name="P85"><text:span text:style-name="T19">[Ejemplos: Si es una plantilla de maven; grupo id: org.apache.maven.archetypes, Artefacto Id: maven-archetype-webapp. Si es en .Net: </text:span><text:span text:style-name="T21">Modelo Vista Controlador (MVC 5). Raphson method, </text:span><text:span text:style-name="T22">etc</text:span><text:span text:style-name="T19">]</text:span></text:p>
      <text:p text:style-name="P77"/>
      <text:p text:style-name="P79">c) IDE</text:p>
      <text:p text:style-name="P77"/>
      <text:p text:style-name="P84">[Indicar el IDE de desarrollo principal, versión y pluging si fuera necesario. Ejemplo: Visual Studio Code 1.63.3, Eclipse IDE for Enterprise Java and Web Developers – 2021-09, etc]</text:p>
      <text:p text:style-name="P77"><text:soft-page-break/></text:p>
      <text:p text:style-name="P79">d) <text:span text:style-name="T38">Otras herramientas o gestores</text:span> de proyecto</text:p>
      <text:p text:style-name="P78"/>
      <text:p text:style-name="P84">[Solo si se hiciera uso de alguna otra herramienta y versión como los gestores de proyectos. Ejemplo: En el caso de Java; Maven, etc]</text:p>
      <text:p text:style-name="P78"/>
      <text:p text:style-name="P80">d) <text:span text:style-name="T36">Otras dependencias</text:span></text:p>
      <text:p text:style-name="P78"/>
      <text:p text:style-name="P84">[Enumerar otras dependencias y sus versiones como por ejemplo conectores a base de datos, JPA, utilidades, etc]</text:p>
      <text:p text:style-name="P48"/>
      <text:p text:style-name="P23"/>
      <text:h text:style-name="P94" text:outline-level="2"><text:bookmark-start text:name="__RefHeading___Toc3229_28224326691"/>Plataforma <text:span text:style-name="T41">de Ejecución</text:span><text:bookmark-end text:name="__RefHeading___Toc3229_28224326691"/></text:h>
      <text:p text:style-name="P38"><text:bookmark-start text:name="__RefHeading___Toc3229_282243266911"/><text:bookmark-end text:name="__RefHeading___Toc3229_282243266911"/></text:p>
      <text:p text:style-name="P64"><text:span text:style-name="T7">2.</text:span><text:span text:style-name="T10">2</text:span><text:span text:style-name="T7">.</text:span><text:span text:style-name="T11">1</text:span><text:span text:style-name="T7">. </text:span><text:span text:style-name="T11">Servidor</text:span></text:p>
      <text:p text:style-name="P66"/>
      <text:p text:style-name="P61"><text:span text:style-name="T13">A </text:span><text:span text:style-name="T12">continuación se indican las características técnicas de mínimos para la ejecución de la aplicación descrita en el proyecto:</text:span></text:p>
      <text:p text:style-name="P70"/>
      <text:p text:style-name="P50"><text:span text:style-name="T25">Servidor web </text:span><text:span text:style-name="T26">y versión</text:span><text:span text:style-name="T23">:</text:span></text:p>
      <text:p text:style-name="P51"><text:span text:style-name="T24">Sistema </text:span><text:span text:style-name="T26">o</text:span><text:span text:style-name="T24">perativo </text:span><text:span text:style-name="T26">y versión</text:span><text:span text:style-name="T23">:</text:span></text:p>
      <text:p text:style-name="P51"><text:span text:style-name="T24">Runtime/Interprete y versión</text:span><text:span text:style-name="T23">:</text:span></text:p>
      <text:p text:style-name="P51"><text:span text:style-name="T24">Observaciones a la configuración</text:span><text:span text:style-name="T23">:</text:span></text:p>
      <text:p text:style-name="P69"/>
      <text:p text:style-name="P69"/>
      <text:p text:style-name="P60"><text:span text:style-name="T7">2.</text:span><text:span text:style-name="T10">2</text:span><text:span text:style-name="T7">.2. Alojamiento </text:span><text:span text:style-name="T8">físico/ </text:span><text:span text:style-name="T9">Entornos de ejecución</text:span></text:p>
      <text:p text:style-name="P67"/>
      <text:p text:style-name="P63"><text:span text:style-name="T13">A </text:span><text:span text:style-name="T12">continuación, se indican </text:span><text:span text:style-name="T14">los directorios</text:span><text:span text:style-name="T12"> </text:span><text:span text:style-name="T14">donde se ubicarán los ficheros de la aplicación desplegada </text:span><text:span text:style-name="T16">[</text:span><text:span text:style-name="T12">solo si se conocieran</text:span><text:span text:style-name="T16">]</text:span><text:span text:style-name="T12">:</text:span></text:p>
      <text:p text:style-name="P71"/>
      <text:p text:style-name="P53"><text:span text:style-name="T27">Desarrollo</text:span>:</text:p>
      <text:p text:style-name="P53"><text:span text:style-name="T27">Pre-Producción/</text:span><text:span text:style-name="T28">Pruebas</text:span>:</text:p>
      <text:p text:style-name="P58"><text:span text:style-name="T20">Producción</text:span><text:span text:style-name="T18">:</text:span></text:p>
      <text:p text:style-name="P24"/>
      <text:p text:style-name="P24"/>
      <text:h text:style-name="P95" text:outline-level="2"><text:bookmark-start text:name="__RefHeading___Toc3229_282243266912"/>Puntos de acceso a la aplicación<text:bookmark-end text:name="__RefHeading___Toc3229_282243266912"/></text:h>
      <text:p text:style-name="P68"/>
      <text:p text:style-name="P62"><text:span text:style-name="T13">A </text:span><text:span text:style-name="T12">continuación se indican los puntos de acceso url a la aplicación </text:span><text:span text:style-name="T16">[</text:span><text:span text:style-name="T12">solo si se conocieran</text:span><text:span text:style-name="T16">]</text:span><text:span text:style-name="T12">:</text:span></text:p>
      <text:p text:style-name="P72"/>
      <text:p text:style-name="P54"><text:span text:style-name="T27">Desarrollo</text:span>:</text:p>
      <text:p text:style-name="P54"><text:span text:style-name="T27">Pre-Producción</text:span>:</text:p>
      <text:p text:style-name="P54"><text:span text:style-name="T27">Producción</text:span>:</text:p>
      <text:p text:style-name="P49"/>
      <text:p text:style-name="P40"/>
      <text:h text:style-name="P89" text:outline-level="1"><text:bookmark-start text:name="__RefHeading___Toc652_27234699271111"/>Base<text:span text:style-name="T37">s</text:span> de Datos<text:bookmark-end text:name="__RefHeading___Toc652_27234699271111"/></text:h>
      <text:p text:style-name="P59"/>
      <text:p text:style-name="P55"><text:span text:style-name="T29">Base de datos</text:span>: <text:span text:style-name="T39">[MySql | Postgresql | Oracle | SqlServer | etc]</text:span></text:p>
      <text:p text:style-name="P55"><text:span text:style-name="T29">Versión</text:span>:<text:span text:style-name="T39">[Indicar la versión]</text:span></text:p>
      <text:p text:style-name="P56"><text:bookmark-start text:name="__RefHeading___Toc3229_2822432669121"/><text:span text:style-name="T29">Esquema</text:span>:<text:span text:style-name="T39">[Indicar el nombre del esquema asignado a este proyecto (pueden estar implicados varios esquemas).</text:span><text:bookmark-end text:name="__RefHeading___Toc3229_2822432669121"/></text:p>
      <text:p text:style-name="P37"/>
      <text:p text:style-name="P41"/>
      <text:p text:style-name="P41"/>
      <text:p text:style-name="P41"/>
      <text:p text:style-name="P41"/>
      <text:p text:style-name="P41"/>
      <text:h text:style-name="P90" text:outline-level="1"><text:bookmark-start text:name="__RefHeading___Toc652_272346992711111"/><text:soft-page-break/>Interfaces externas<text:bookmark-end text:name="__RefHeading___Toc652_272346992711111"/></text:h>
      <text:p text:style-name="P75"/>
      <text:p text:style-name="P65"><text:span text:style-name="T15">[</text:span><text:span text:style-name="T12">Indicar si la aplicación se comunicará o tomará datos de otras interfaces externas, tipo WebServices </text:span><text:span text:style-name="T17">(para su capa de datos)</text:span><text:span text:style-name="T12"> o por ejemplo si hará uso de WebApis, etc]</text:span></text:p>
      <text:p text:style-name="P73"/>
      <text:p text:style-name="P74"/>
      <text:h text:style-name="P91" text:outline-level="1"><text:bookmark-start text:name="__RefHeading___Toc652_2723469927111"/>Seguridad<text:bookmark-end text:name="__RefHeading___Toc652_2723469927111"/></text:h>
      <text:list xml:id="list149322638" text:style-name="L2">
        <text:list-header>
          <text:p text:style-name="P106"/>
        </text:list-header>
      </text:list>
      <text:p text:style-name="P31"><text:span text:style-name="T5">[</text:span><text:span text:style-name="T40">Indicar aquí las medidas de seguridad recomendadas para el proyecto. Puede indicar desde los roles de usuarios necesarios para autenticarse o medidas de ofuscación de datos en paso de parámetros Get, cookies, etc.</text:span><text:span text:style-name="T30">]</text:span></text:p>
      <text:p text:style-name="P34"/>
      <text:p text:style-name="P74"/>
      <text:h text:style-name="P92" text:outline-level="1"><text:bookmark-start text:name="__RefHeading___Toc652_27234699271114"/>Control de versiones<text:bookmark-end text:name="__RefHeading___Toc652_27234699271114"/></text:h>
      <text:list xml:id="list4106551076640" text:continue-numbering="true" text:style-name="L2">
        <text:list-header>
          <text:p text:style-name="P107"/>
        </text:list-header>
      </text:list>
      <text:p text:style-name="P57"><text:span text:style-name="T5">[</text:span><text:span text:style-name="T30">Si se </text:span><text:span text:style-name="T40">hará</text:span><text:span text:style-name="T30"> uso de un control de versiones, indicar la/s rutas al control de versiones y datos para la conexión con el mismo]</text:span></text:p>
      <text:p text:style-name="P57"/>
      <text:p text:style-name="P57"/>
      <text:h text:style-name="P90" text:outline-level="1"><text:bookmark-start text:name="__RefHeading___Toc652_27234699271112"/>Observaciones<text:bookmark-end text:name="__RefHeading___Toc652_27234699271112"/></text:h>
      <text:list xml:id="list4106290771395" text:continue-numbering="true" text:style-name="L2">
        <text:list-header>
          <text:p text:style-name="P108"/>
        </text:list-header>
      </text:list>
      <text:p text:style-name="P33"><text:span text:style-name="T5">[</text:span><text:span text:style-name="T40">Cualquier otros comentarios de interés de carácter técnico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1.3cm" fo:margin-right="0cm" fo:margin-top="0cm" fo:margin-bottom="0cm" style:contextual-spacing="false" fo:text-align="justify" style:justify-single-word="false" fo:text-indent="-1.3cm" style:auto-text-indent="false" fo:background-color="transparent" fo:keep-with-next="always">
        <style:tab-stops/>
      </style:paragraph-properties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n_20_del_20_documento" style:display-name="Resumen del documento" style:family="paragraph" style:default-outline-level="">
      <loext:graphic-properties draw:fill="solid" draw:fill-color="#f5f3dd"/>
      <style:paragraph-properties fo:margin-top="0cm" fo:margin-bottom="0.106cm" style:contextual-spacing="false" fo:text-align="justify" style:justify-single-word="false" fo:orphans="2" fo:widows="2" fo:hyphenation-ladder-count="no-limit" fo:background-color="#f5f3dd" fo:padding="0.141cm" fo:border="0.51pt solid #c0c0c0" style:shadow="none" style:writing-mode="lr-tb"/>
      <style:text-properties fo:color="#2f3335" loext:opacity="100%" style:font-name="Trebuchet MS" fo:font-family="'Trebuchet MS'" style:font-family-generic="roman" style:font-pitch="variable" fo:font-size="10pt" fo:language="es" fo:country="ES" style:letter-kerning="true" style:font-name-asian="Trebuchet MS1" style:font-family-asian="'Trebuchet MS'" style:font-family-generic-asian="system" style:font-pitch-asian="variable" style:font-size-asian="10pt" style:language-asian="zh" style:country-asian="CN" style:font-name-complex="Liberation Serif2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1.251cm" fo:margin-left="2.52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51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51cm" fo:margin-left="2.52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13.002cm" style:rel-column-width="51636*"/>
    </style:style>
    <style:style style:name="Tabla3.B" style:family="table-column">
      <style:table-column-properties style:column-width="3.5cm" style:rel-column-width="13899*"/>
    </style:style>
    <style:style style:name="Tabla3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MP1" style:family="paragraph" style:parent-style-name="Header">
      <style:paragraph-properties fo:text-align="justify" style:justify-single-word="false"/>
      <style:text-properties fo:language="es" fo:country="ES"/>
    </style:style>
    <style:style style:name="MP2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Arial" fo:font-size="10pt" fo:language="es" fo:country="ES" officeooo:rsid="0001f8f3" officeooo:paragraph-rsid="011507eb" style:font-size-asian="10pt" style:font-size-complex="10pt"/>
    </style:style>
    <style:style style:name="MP3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MP4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" fo:font-size="8pt" fo:language="es" fo:country="ES" officeooo:rsid="00063724" officeooo:paragraph-rsid="00063724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style:font-name="Arial" fo:font-size="10pt" fo:language="es" fo:country="ES" officeooo:paragraph-rsid="00063724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style:font-name="Times New Roman" fo:font-size="8pt" style:font-size-asian="8pt" style:font-size-complex="8pt"/>
    </style:style>
    <style:style style:name="MT2" style:family="text">
      <style:text-properties style:font-name="Times New Roman" fo:font-size="8pt" officeooo:rsid="011507eb" style:font-size-asian="8pt" style:font-size-complex="8pt"/>
    </style:style>
    <style:style style:name="MT3" style:family="text">
      <style:text-properties style:font-name="Times New Roman" fo:font-size="8pt" officeooo:rsid="0143c4a4" style:font-size-asian="8pt" style:font-size-complex="8pt"/>
    </style:style>
    <style:style style:name="MT4" style:family="text">
      <style:text-properties officeooo:rsid="000c70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5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4cm" fo:margin-left="0cm" fo:margin-right="0cm" fo:margin-bottom="3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 table:style-name="TableLine1782368908544">
            <table:table-cell table:style-name="Tabla3.A1" office:value-type="string">
              <text:p text:style-name="MP7"><text:file-name text:display="name-and-extension">DAW_PRW_[APCODE]_4. Ficha técnica.odt</text:file-name></text:p>
            </table:table-cell>
            <table:table-cell table:style-name="Tabla3.A1" office:value-type="string">
              <text:p text:style-name="MP8"><text:span text:style-name="MT4">Versión: </text:span><text:modification-date style:data-style-name="N36">11/01/2024</text:modification-date></text:p>
            </table:table-cell>
          </table:table-row>
        </table:table>
        <text:p text:style-name="MP1"/>
      </style:header>
      <style:header-first>
        <text:p text:style-name="MP2"><draw:frame draw:style-name="Mfr1" draw:name="Imagen3" text:anchor-type="char" svg:x="-2.099cm" svg:y="-2cm" svg:width="3.284cm" svg:height="2.859cm" draw:z-index="0"><draw:image xlink:href="Pictures/10000000000001A00000016A518DA91D8BA8F302.jpg" xlink:type="simple" xlink:show="embed" xlink:actuate="onLoad" draw:mime-type="image/jpeg"/></draw:frame><text:span text:style-name="MT1"><text:tab/></text:span><text:span text:style-name="MT2">Proyecto de Desarrollo de Aplicaciones Web (P</text:span><text:span text:style-name="MT3">RW</text:span><text:span text:style-name="MT2">) / Desarrollo de Aplicaciones Web</text:span></text:p>
        <text:p text:style-name="MP3"/>
        <text:p text:style-name="MP1"/>
        <text:p text:style-name="MP1"/>
        <text:p text:style-name="MP4"><text:tab/>Área de Informática y Nuevas Tecnologías</text:p>
      </style:header-first>
      <style:footer>
        <text:p text:style-name="MP5"><text:page-number text:select-page="current">6</text:page-number>/<text:page-count>6</text:page-count></text:p>
      </style:footer>
      <style:footer-first>
        <text:p text:style-name="MP6"><text:page-number text:select-page="current">1</text:page-number>/<text:page-count>6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4-01-11T00:41:05.260000000</dc:date>
    <meta:editing-duration>P2DT4H18M13S</meta:editing-duration>
    <meta:editing-cycles>253</meta:editing-cycles>
    <meta:print-date>2022-01-11T10:59:08.346000000</meta:print-date>
    <meta:document-statistic meta:table-count="3" meta:image-count="1" meta:object-count="0" meta:page-count="6" meta:paragraph-count="95" meta:word-count="652" meta:character-count="4137" meta:non-whitespace-character-count="3593"/>
  </office:meta>
</office:document-meta>
</file>